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E000002086CB98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8pt" style:font-size-asian="8pt" style:font-size-complex="8pt"/>
    </style:style>
    <style:style style:name="P2" style:family="paragraph" style:parent-style-name="Heading_20_2">
      <style:text-properties officeooo:rsid="00399f04" officeooo:paragraph-rsid="00399f04"/>
    </style:style>
    <style:style style:name="P3" style:family="paragraph" style:parent-style-name="Standard">
      <style:text-properties officeooo:rsid="0012f15e" officeooo:paragraph-rsid="0012f15e"/>
    </style:style>
    <style:style style:name="P4" style:family="paragraph" style:parent-style-name="Standard">
      <style:text-properties officeooo:rsid="0012f15e" officeooo:paragraph-rsid="0012f15e" fo:background-color="#ffffff"/>
    </style:style>
    <style:style style:name="P5" style:family="paragraph" style:parent-style-name="Standard">
      <style:text-properties fo:font-weight="bold" officeooo:rsid="0012f15e" officeooo:paragraph-rsid="00399f04" style:font-weight-asian="bold" style:font-weight-complex="bold"/>
    </style:style>
    <style:style style:name="P6" style:family="paragraph" style:parent-style-name="Standard">
      <style:text-properties officeooo:rsid="00399f04" officeooo:paragraph-rsid="00399f04" fo:background-color="#ffffff"/>
    </style:style>
    <style:style style:name="P7" style:family="paragraph" style:parent-style-name="Standard">
      <style:text-properties fo:font-size="10pt" officeooo:rsid="00399f04" officeooo:paragraph-rsid="00399f04" fo:background-color="#ffffff" style:font-size-asian="10pt" style:font-size-complex="10pt"/>
    </style:style>
    <style:style style:name="P8" style:family="paragraph" style:parent-style-name="Standard">
      <style:text-properties officeooo:rsid="00399f04" officeooo:paragraph-rsid="0012f15e" fo:background-color="#ffffff"/>
    </style:style>
    <style:style style:name="P9" style:family="paragraph" style:parent-style-name="Standard">
      <style:text-properties fo:font-weight="bold" officeooo:rsid="0012f15e" officeooo:paragraph-rsid="0012f15e" style:font-weight-asian="bold" style:font-weight-complex="bold"/>
    </style:style>
    <style:style style:name="P10" style:family="paragraph" style:parent-style-name="Standard">
      <style:text-properties officeooo:rsid="00399f04" officeooo:paragraph-rsid="00399f04"/>
    </style:style>
    <style:style style:name="P11" style:family="paragraph" style:parent-style-name="Standard">
      <style:text-properties fo:font-size="10pt" officeooo:rsid="0013b28a" officeooo:paragraph-rsid="0013b28a" style:font-size-asian="10pt" style:font-size-complex="10pt"/>
    </style:style>
    <style:style style:name="P12" style:family="paragraph" style:parent-style-name="Standard">
      <style:text-properties fo:font-weight="bold" officeooo:rsid="0012f15e" officeooo:paragraph-rsid="0012f15e" fo:background-color="#cccccc" style:font-weight-asian="bold" style:font-weight-complex="bold"/>
    </style:style>
    <style:style style:name="P13" style:family="paragraph" style:parent-style-name="Standard">
      <style:text-properties fo:font-weight="bold" officeooo:rsid="0013b28a" officeooo:paragraph-rsid="0013b28a" fo:background-color="transparent" style:font-weight-asian="bold" style:font-weight-complex="bold"/>
    </style:style>
    <style:style style:name="P14" style:family="paragraph" style:parent-style-name="Standard">
      <style:text-properties fo:font-weight="normal" officeooo:rsid="0013b28a" officeooo:paragraph-rsid="003e96c7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13b28a" officeooo:paragraph-rsid="0013b28a" fo:background-color="transparent" style:font-weight-asian="normal" style:font-weight-complex="normal"/>
    </style:style>
    <style:style style:name="P16" style:family="paragraph" style:parent-style-name="Standard">
      <style:text-properties officeooo:rsid="0013b28a" officeooo:paragraph-rsid="0013b28a"/>
    </style:style>
    <style:style style:name="T1" style:family="text">
      <style:text-properties officeooo:rsid="00399f04" fo:background-color="#cccccc" loext:char-shading-value="0"/>
    </style:style>
    <style:style style:name="T2" style:family="text">
      <style:text-properties fo:background-color="#cccccc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adfe9" fo:background-color="#ffffff" loext:char-shading-value="0"/>
    </style:style>
    <style:style style:name="T6" style:family="text">
      <style:text-properties officeooo:rsid="00399f0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99f04" style:font-weight-asian="bold" style:font-weight-complex="bold"/>
    </style:style>
    <style:style style:name="T9" style:family="text">
      <style:text-properties officeooo:rsid="0023713b"/>
    </style:style>
    <style:style style:name="T10" style:family="text">
      <style:text-properties officeooo:rsid="00338951"/>
    </style:style>
    <style:style style:name="T11" style:family="text">
      <style:text-properties fo:font-weight="normal" officeooo:rsid="00399f04" style:font-weight-asian="normal" style:font-weight-complex="normal"/>
    </style:style>
    <style:style style:name="T12" style:family="text">
      <style:text-properties officeooo:rsid="0013b28a"/>
    </style:style>
    <style:style style:name="T13" style:family="text">
      <style:text-properties fo:background-color="#cccccc" loext:char-shading-value="0"/>
    </style:style>
    <style:style style:name="T14" style:family="text">
      <style:text-properties officeooo:rsid="003d76d4"/>
    </style:style>
    <style:style style:name="T15" style:family="text">
      <style:text-properties fo:font-weight="bold" officeooo:rsid="003b305b" style:font-weight-asian="bold" style:font-weight-complex="bold"/>
    </style:style>
    <style:style style:name="T16" style:family="text">
      <style:text-properties officeooo:rsid="0040716d"/>
    </style:style>
    <style:style style:name="T17" style:family="text">
      <style:text-properties officeooo:rsid="003b305b"/>
    </style:style>
    <style:style style:name="T18" style:family="text">
      <style:text-properties officeooo:rsid="003e96c7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fo:background-color="#cccccc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JATK APBD 2026</text:h>
      <text:h text:style-name="P2" text:outline-level="2">Tutorial 8</text:h>
      <text:p text:style-name="P3">W oparciu o załączony diagram <text:span text:style-name="T1">Hospital-</text:span><text:span text:style-name="T2">ERD.</text:span><text:span text:style-name="T1">png</text:span> oraz skrypt <text:span text:style-name="T3">create.sql</text:span><text:span text:style-name="T4"> </text:span><text:span text:style-name="T5">utwórz aplikację WebApi i</text:span><text:span text:style-name="T4"> rozwiąż poniższe zadania.</text:span></text:p>
      <text:p text:style-name="P4"><draw:frame draw:style-name="fr1" draw:name="Image1" text:anchor-type="char" svg:width="6.6929in" svg:height="3.6945in" draw:z-index="0"><draw:image xlink:href="Pictures/10000001000003AE000002086CB98A9E.png" xlink:type="simple" xlink:show="embed" xlink:actuate="onLoad" draw:mime-type="image/png"/></draw:frame></text:p>
      <text:p text:style-name="P5">Zad1.</text:p>
      <text:p text:style-name="P6">Utwórz bazę danych z użyciem dostarczonego skryptu <text:span text:style-name="T3">create.sql</text:span>. Następnie korzystając z podejścia DatabaseFirst z frameworka EntityFrameworkCore, przeprowadź operację scaffold, która utworzy kontekst bazy danych bazujący na tabelach, które istnieją już w bazie.</text:p>
      <text:p text:style-name="P6"/>
      <text:p text:style-name="P7">https://learn.microsoft.com/en-us/ef/core/managing-schemas/scaffolding/?tabs=dotnet-core-cli</text:p>
      <text:p text:style-name="P8"/>
      <text:p text:style-name="P9">Zad<text:span text:style-name="T6">2</text:span>.</text:p>
      <text:p text:style-name="P3">Przygotuj koncówkę <text:span text:style-name="T7">/api/</text:span><text:span text:style-name="T8">patients</text:span> odpowiadającą na zapytania <text:span text:style-name="T7">HTTP GET</text:span>. Końcówka powinna zwrócić dane na temat wszystkich obecnych w bazie <text:span text:style-name="T6">pacjentach</text:span><text:span text:style-name="T9">.</text:span> Dodatkowo powinna ona reagować na opcjonalny parametr żądania “<text:span text:style-name="T8">search</text:span>”, który umożliwia filtrowanie kolekcji wynikowej na <text:span text:style-name="T10">podstawie </text:span><text:span text:style-name="T6">stringa przekazanego w zapytaniu</text:span>. <text:span text:style-name="T6">Filtrowanie kolekcji ma się odbywać poprzez sprawdzanie wartości firstname oraz lastname, w poszukiwaniu pasujących wartości.</text:span></text:p>
      <text:p text:style-name="P3"/>
      <text:p text:style-name="P10">Np. dla rekordów:</text:p>
      <text:p text:style-name="P10">1. FirstName=J<text:span text:style-name="T7">an</text:span>, LastName=Kowalski</text:p>
      <text:p text:style-name="P10">2. FirstName=Jakub, LastName=J<text:span text:style-name="T7">an</text:span>kowski</text:p>
      <text:p text:style-name="P10">3. FirstName=Jo<text:span text:style-name="T7">an</text:span>na, LastName=Doe</text:p>
      <text:p text:style-name="P10"/>
      <text:p text:style-name="P10">Wysłanie zapytania pod ares <text:span text:style-name="T7">/api/patients?search=an</text:span> powinno zwrócić wszystkie powyższe rekordy.</text:p>
      <text:p text:style-name="P3"/>
      <text:p text:style-name="P11">Podpowiedź: Do filtrowania wykorzystać instrukcję <text:span text:style-name="T7">LIKE </text:span><text:span text:style-name="T11">oraz wildcardy</text:span><text:span text:style-name="T8"> %</text:span>.</text:p>
      <text:p text:style-name="P3"/>
      <text:p text:style-name="P3"><text:span text:style-name="T12">Wymagany format odpowiedzi</text:span> znajdziesz w pliku <text:span text:style-name="T13">GET.json</text:span></text:p>
      <text:p text:style-name="P12"/>
      <text:p text:style-name="P13"><text:soft-page-break/>Zad<text:span text:style-name="T14">3</text:span>.</text:p>
      <text:p text:style-name="P14">Przygotuj końcówkę <text:span text:style-name="T7">/api/</text:span><text:span text:style-name="T15">patients/{int:id}/bedassignments</text:span><text:span text:style-name="T7"> </text:span>odpowiadającą na zapytania <text:span text:style-name="T7">HTTP POST</text:span>. Końcówka powinna umożliwić <text:span text:style-name="T16">przypisanie pacjentowi łóżka</text:span><text:span text:style-name="T17">. W ramach zapytania serwer powinien znaleźć łóżko o dan</text:span><text:span text:style-name="T18">y</text:span><text:span text:style-name="T17">m typie, w danym oddziale, które we wskazanym okresie czasu nie jest przez nikogo zajęte. Jeżeli takiego łóżka nie ma, serwer powinien zwrócić kod 404 </text:span><text:span text:style-name="T16">(Zwracane komunikaty powinny być czytelne i jednoznaczne. Nieakceptowalne jest zastosowanie jednej długiej wiadomości, która nie mówi dokładnie, co się stało).</text:span></text:p>
      <text:p text:style-name="P15"/>
      <text:p text:style-name="P16"><text:span text:style-name="T19">Wymagany format przesyłanych danych znajdziesz w pliku </text:span><text:span text:style-name="T20">POST.js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1:25.752389192</meta:creation-date>
    <dc:date>2026-05-16T16:00:58.188612431</dc:date>
    <meta:editing-duration>PT1H3M14S</meta:editing-duration>
    <meta:editing-cycles>43</meta:editing-cycles>
    <meta:generator>LibreOffice/26.2.3.2$Linux_X86_64 LibreOffice_project/a31940f583db492bb69b3a601caf6d1b0ecf61f1</meta:generator>
    <meta:document-statistic meta:table-count="0" meta:image-count="1" meta:object-count="0" meta:page-count="2" meta:paragraph-count="18" meta:word-count="224" meta:character-count="1878" meta:non-whitespace-character-count="1672"/>
  </office:meta>
</office:document-meta>
</file>